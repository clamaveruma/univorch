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Courier New" svg:font-family="'Courier New'"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Roboto Mono1" svg:font-family="'Roboto Mono'"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list-style-name="WWNum10">
      <style:paragraph-properties fo:margin-left="0.5in" fo:margin-right="0in" fo:line-height="150%" fo:text-align="justify" style:justify-single-word="false" fo:text-indent="-0.25in" style:auto-text-indent="false"/>
    </style:style>
    <style:style style:name="P3" style:family="paragraph" style:parent-style-name="Standard" style:list-style-name="WWNum4">
      <style:paragraph-properties fo:margin-left="0.5in" fo:margin-right="0in" fo:line-height="150%" fo:text-align="justify" style:justify-single-word="false" fo:text-indent="-0.25in" style:auto-text-indent="false"/>
    </style:style>
    <style:style style:name="P4" style:family="paragraph" style:parent-style-name="Standard" style:list-style-name="WWNum6">
      <style:paragraph-properties fo:margin-left="0.5in" fo:margin-right="0in" fo:line-height="150%" fo:text-align="justify" style:justify-single-word="false" fo:text-indent="-0.25in" style:auto-text-indent="false"/>
    </style:style>
    <style:style style:name="P5" style:family="paragraph" style:parent-style-name="Standard" style:list-style-name="WWNum11">
      <style:paragraph-properties fo:margin-left="0.5in" fo:margin-right="0in" fo:line-height="150%" fo:text-align="justify" style:justify-single-word="false" fo:text-indent="-0.25in" style:auto-text-indent="false"/>
    </style:style>
    <style:style style:name="P6" style:family="paragraph" style:parent-style-name="Standard" style:list-style-name="WWNum8">
      <style:paragraph-properties fo:margin-left="0.5in" fo:margin-right="0in" fo:line-height="150%" fo:text-align="justify" style:justify-single-word="false" fo:text-indent="-0.25in" style:auto-text-indent="false"/>
    </style:style>
    <style:style style:name="P7" style:family="paragraph" style:parent-style-name="Standard" style:list-style-name="WWNum2">
      <style:paragraph-properties fo:margin-left="0.5in" fo:margin-right="0in" fo:line-height="150%" fo:text-align="justify" style:justify-single-word="false" fo:text-indent="-0.25in" style:auto-text-indent="false"/>
    </style:style>
    <style:style style:name="P8" style:family="paragraph" style:parent-style-name="Standard" style:list-style-name="WWNum7">
      <style:paragraph-properties fo:margin-left="0.5in" fo:margin-right="0in" fo:line-height="150%" fo:text-align="justify" style:justify-single-word="false" fo:text-indent="-0.25in" style:auto-text-indent="false"/>
    </style:style>
    <style:style style:name="P9" style:family="paragraph" style:parent-style-name="Standard" style:list-style-name="WWNum9">
      <style:paragraph-properties fo:margin-left="0.5in" fo:margin-right="0in" fo:line-height="150%" fo:text-align="justify" style:justify-single-word="false" fo:text-indent="-0.25in" style:auto-text-indent="false"/>
    </style:style>
    <style:style style:name="P10" style:family="paragraph" style:parent-style-name="Standard" style:list-style-name="WWNum1">
      <style:paragraph-properties fo:margin-left="0.5in" fo:margin-right="0in" fo:line-height="150%" fo:text-align="justify" style:justify-single-word="false" fo:text-indent="-0.25in" style:auto-text-indent="false"/>
    </style:style>
    <style:style style:name="P11" style:family="paragraph" style:parent-style-name="Standard" style:list-style-name="WWNum3">
      <style:paragraph-properties fo:margin-left="0.5in" fo:margin-right="0in" fo:line-height="150%" fo:text-align="justify" style:justify-single-word="false" fo:text-indent="-0.25in" style:auto-text-indent="false"/>
    </style:style>
    <style:style style:name="P12" style:family="paragraph" style:parent-style-name="Standard">
      <style:paragraph-properties fo:margin-left="0.5in" fo:margin-right="0in" fo:line-height="150%" fo:text-align="justify" style:justify-single-word="false" fo:text-indent="0in" style:auto-text-indent="false"/>
    </style:style>
    <style:style style:name="P13" style:family="paragraph" style:parent-style-name="Standard">
      <style:paragraph-properties fo:margin-left="0in" fo:margin-right="0in" fo:line-height="150%" fo:text-align="justify" style:justify-single-word="false" fo:text-indent="0.5in" style:auto-text-indent="false"/>
    </style:style>
    <style:style style:name="P14" style:family="paragraph" style:parent-style-name="Standard" style:list-style-name="WWNum4">
      <style:paragraph-properties fo:margin-left="1in" fo:margin-right="0in" fo:line-height="150%" fo:text-align="justify" style:justify-single-word="false" fo:text-indent="-0.25in" style:auto-text-indent="false"/>
    </style:style>
    <style:style style:name="P15" style:family="paragraph" style:parent-style-name="Standard" style:list-style-name="WWNum5">
      <style:paragraph-properties fo:margin-left="1in" fo:margin-right="0in" fo:line-height="150%" fo:text-align="justify" style:justify-single-word="false" fo:text-indent="-0.25in" style:auto-text-indent="false"/>
    </style:style>
    <style:style style:name="P16" style:family="paragraph" style:parent-style-name="Standard" style:list-style-name="WWNum6">
      <style:paragraph-properties fo:margin-left="1in" fo:margin-right="0in" fo:line-height="150%" fo:text-align="justify" style:justify-single-word="false" fo:text-indent="-0.25in" style:auto-text-indent="false"/>
    </style:style>
    <style:style style:name="P17" style:family="paragraph" style:parent-style-name="Standard" style:list-style-name="WWNum11">
      <style:paragraph-properties fo:margin-left="1in" fo:margin-right="0in" fo:line-height="150%" fo:text-align="justify" style:justify-single-word="false" fo:text-indent="-0.25in" style:auto-text-indent="false"/>
    </style:style>
    <style:style style:name="P18" style:family="paragraph" style:parent-style-name="Standard" style:list-style-name="WWNum8">
      <style:paragraph-properties fo:margin-left="1in" fo:margin-right="0in" fo:line-height="150%" fo:text-align="justify" style:justify-single-word="false" fo:text-indent="-0.25in" style:auto-text-indent="false"/>
    </style:style>
    <style:style style:name="P19" style:family="paragraph" style:parent-style-name="Standard" style:list-style-name="WWNum3">
      <style:paragraph-properties fo:margin-left="1in" fo:margin-right="0in" fo:line-height="150%" fo:text-align="justify" style:justify-single-word="false" fo:text-indent="-0.25in" style:auto-text-indent="false"/>
    </style:style>
    <style:style style:name="P20" style:family="paragraph" style:parent-style-name="Standard">
      <style:paragraph-properties fo:margin-left="1in" fo:margin-right="0in" fo:line-height="150%" fo:text-align="justify" style:justify-single-word="false" fo:text-indent="0in" style:auto-text-indent="false"/>
    </style:style>
    <style:style style:name="P21" style:family="paragraph" style:parent-style-name="Standard">
      <style:paragraph-properties fo:margin-left="0in" fo:margin-right="0in" fo:line-height="150%" fo:text-align="justify" style:justify-single-word="false" fo:text-indent="0in" style:auto-text-indent="false"/>
    </style:style>
    <style:style style:name="P22" style:family="paragraph" style:parent-style-name="Standard" style:list-style-name="WWNum8">
      <style:paragraph-properties fo:margin-left="1.5in" fo:margin-right="0in" fo:line-height="150%" fo:text-align="justify" style:justify-single-word="false" fo:text-indent="-0.25in" style:auto-text-indent="false"/>
    </style:style>
    <style:style style:name="P23" style:family="paragraph" style:parent-style-name="Standard" style:list-style-name="WWNum3">
      <style:paragraph-properties fo:margin-left="1.5in" fo:margin-right="0in" fo:line-height="150%" fo:text-align="justify" style:justify-single-word="false" fo:text-indent="-0.25in" style:auto-text-indent="false"/>
    </style:style>
    <style:style style:name="P24" style:family="paragraph" style:parent-style-name="Standard" style:list-style-name="WWNum3">
      <style:paragraph-properties fo:margin-left="2in" fo:margin-right="0in" fo:line-height="150%" fo:text-align="justify" style:justify-single-word="false" fo:text-indent="-0.25in" style:auto-text-indent="false"/>
    </style:style>
    <style:style style:name="P25" style:family="paragraph" style:parent-style-name="Heading_20_1">
      <style:paragraph-properties fo:line-height="150%" fo:text-align="justify" style:justify-single-word="false"/>
    </style:style>
    <style:style style:name="P26" style:family="paragraph" style:parent-style-name="Heading_20_2">
      <style:paragraph-properties fo:line-height="150%" fo:text-align="justify" style:justify-single-word="false"/>
    </style:style>
    <style:style style:name="P27" style:family="paragraph" style:parent-style-name="Title" style:master-page-name="Standard">
      <style:paragraph-properties fo:line-height="150%" fo:text-align="justify" style:justify-single-word="false" style:page-number="1"/>
    </style:style>
    <style:style style:name="T1" style:family="text">
      <style:text-properties style:text-underline-style="none"/>
    </style:style>
    <style:style style:name="T2" style:family="text">
      <style:text-properties fo:font-weight="bold" style:font-weight-asian="bold" style:font-weight-complex="bold"/>
    </style:style>
    <style:style style:name="T3" style:family="text">
      <style:text-properties fo:color="#188038" style:font-name="Roboto Mono" fo:font-weight="bold" style:font-name-asian="Roboto Mono1" style:font-weight-asian="bold" style:font-name-complex="Roboto Mono1" style:font-weight-complex="bold"/>
    </style:style>
    <style:style style:name="T4" style:family="text">
      <style:text-properties fo:color="#188038" style:font-name="Roboto Mono" style:font-name-asian="Roboto Mono1" style:font-name-complex="Roboto Mono1"/>
    </style:style>
    <style:style style:name="T5" style:family="text">
      <style:text-properties fo:color="#0000ff" style:font-name="Courier New" style:font-name-asian="Courier New1" style:font-name-complex="Courier New1"/>
    </style:style>
    <style:style style:name="T6" style:family="text">
      <style:text-properties fo:color="#0000ff" style:font-name="Courier New" style:text-underline-style="none" style:font-name-asian="Courier New1" style:font-name-complex="Courier New1"/>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bookmark text:name="_3ra267fld1vi"/>Ideas para el orquestador</text:p>
      <text:p text:style-name="P1"/>
      <text:p text:style-name="P25"><text:bookmark text:name="_vocwhulhfn4i"/>Objeto</text:p>
      <text:p text:style-name="P1">Este documento es un conjunto de ideas iniciales para el desarrollo del orquestador de máquinas virtuales</text:p>
      <text:p text:style-name="P1"/>
      <text:p text:style-name="P25"><text:bookmark text:name="_rvhgvb7lxjla"/>Antecedentes</text:p>
      <text:p text:style-name="P1">Se parte de las librerías esxobjects y <office:annotation office:name="__Annotation__17_2264489086"><dc:creator>Guillermo Pérez Trabado</dc:creator><dc:date>2025-10-16T19:28:25</dc:date><text:p><text:span text:style-name="T7">Ahora hay un paquete más. Yo he implementado un nuevo paquete llamado orchtools que implementa la DB del orquestador en JSON y las políticas de orquestación mínimas que necesitaba para poder poner en marcha asignaturas reales.</text:span></text:p><text:p><text:span text:style-name="T7">esxobjects sería el "addón" de control de ESX que describes mása aelante. Orchtools sería el núcleo del orquestador, y YAMLinfr el núcleo de una aplicación escrita sobre el orquestador para poder definir laboratorios de asianaturas en un contexto de uso en docencia.</text:span></text:p></office:annotation>yamlinfr<office:annotation-end office:name="__Annotation__17_2264489086"/>.</text:p>
      <text:p text:style-name="P1"/>
      <text:p text:style-name="P1"/>
      <text:p text:style-name="P25"><text:bookmark text:name="_s01e2btydr4d"/>Ideas generales</text:p>
      <text:p text:style-name="P1">Para darle una mayor modularidad y poder ser una solución más universal, se propone dividir el orquestador en 2 capas: </text:p>
      <text:list xml:id="list2695266676" text:style-name="WWNum10">
        <text:list-item>
          <text:p text:style-name="P2">Un núcleo de orquestación, el orquestador en sí. Esta capa organiza las máquinas virtuales en general, proporcionando una base universal para varios problemas.</text:p>
        </text:list-item>
        <text:list-item>
          <text:p text:style-name="P2">Una aplicación que utiliza el orquestador, especializada en la creación de conjuntos de VM para las docencia de asignaturas de la universidad. Se puede ver como una aplicación o como un módulo add-on, al <office:annotation office:name="__Annotation__29_2264489086"><dc:creator>Guillermo Pérez Trabado</dc:creator><dc:date>2025-10-16T17:48:11</dc:date><text:p><text:span text:style-name="T7">En general estoy de acuerdo. Creo que hemos conseguido tener la misma idea global del diseño en la cabeza. Lo único que creo que falta es generar un "glosario" de nombres estandarizados para los conceptos, tal como se hace al inicio de los estándares, para poder describir las cosas de forma inambigua.</text:span></text:p></office:annotation>orquestador<office:annotation-end office:name="__Annotation__29_2264489086"/>.</text:p>
        </text:list-item>
        <text:list-item>
          <text:p text:style-name="P2">De esta forma, se podrán hacer más aplicaciones para otros <office:annotation office:name="__Annotation__35_2264489086"><dc:creator>Guillermo Pérez Trabado</dc:creator><dc:date>2025-10-16T17:54:40</dc:date><text:p><text:span text:style-name="T7">Estoy de acuerdo con que el orquestador es el módulo de más alto nivel que mantiene las "definiciones". Me gusta la idea de que en lugar de layer de adaptación se llame add-on de adaptación. Aunque en realidad pueden combinarse ambos conceptos. El orquestador usa un layer abstracto de control de hipervisores, y dicho layer usa add-ons como "drivers" para adaptar las operaciones a cada tipo de hipervisor.</text:span></text:p></office:annotation>problemas<office:annotation-end office:name="__Annotation__35_2264489086"/>.</text:p>
        </text:list-item>
      </text:list>
      <text:p text:style-name="P12"/>
      <text:p text:style-name="P25"><text:bookmark text:name="_puvybx73n9fv"/>Módulo Orquestador.<text:tab/></text:p>
      <text:p text:style-name="P13">Será un servicio linux, que se encarga de mantener la organización de VM. La idea es que los usuarios y aplicaciones superiores interactúen con el orquestador, como objeto de más alto nivel que interactuar directamente con los hipervisores. Ya que proporciona características adicionales, y un interfaz de más alto nivel.</text:p>
      <text:p text:style-name="P13"/>
      <text:p text:style-name="P26"><text:bookmark text:name="_cbwu19jo0f7"/>Conceptos clave</text:p>
      <text:list xml:id="list2370597935" text:style-name="WWNum4">
        <text:list-item>
          <text:p text:style-name="P3"><text:span text:style-name="T2">Definición</text:span> de una VM: Se trata de la lista de todos los parámetros necesarios <office:annotation office:name="__Annotation__52_2264489086"><dc:creator>Guillermo Pérez Trabado</dc:creator><dc:date>2025-10-16T18:09:23</dc:date><text:p><text:span text:style-name="T7">Aquí hay que buscar nombres concretos para diferenciar los conceptos exactos.</text:span></text:p><text:p><text:span text:style-name="T7">Por ejemplo diferenciar el prototipo que se usa para contruir las definiciones (VMWare lo llama "vm prototype" versus "virtual machine").</text:span></text:p><text:p><text:span text:style-name="T7">Ahora tenemos lo mismo pero en dos niveles. Un nivel "prototipo"-&gt;"vm definition" en el orquestador y otro nivel "prototipo"-&gt;"instantiated virtual machine" en el cluster de hipervisores que instancie las definiciones.</text:span></text:p></office:annotation>para<office:annotation-end office:name="__Annotation__52_2264489086"/> desplegar una VM. En estos parámetros están tanto los parámetros que necesita el hypervisor, como otros que se decidan. Por ejemplo: imagen desde la que crear la VM, características hardware, ubicación del disco virtual, datos de red, etc.</text:p>
        </text:list-item>
        <text:list-item>
          <text:p text:style-name="P3"><text:soft-page-break/><text:span text:style-name="T2">VM</text:span>: la VM real que se ejecuta dentro de un hypervisor. Desde un punto de vista conceptual las VM “viven” en el hypervisor.</text:p>
        </text:list-item>
        <text:list-item>
          <text:p text:style-name="P3">VM <text:span text:style-name="T2">descriptor</text:span>. Es el concepto clave de este desarrollo. Es un interface de más alto nivel de la VM. </text:p>
          <text:list>
            <text:list-item>
              <text:p text:style-name="P14">El orquestador, mantiene el listado de los descriptores. Los descriptores “viven” en el orquestador. </text:p>
            </text:list-item>
            <text:list-item>
              <text:p text:style-name="P14">Tienen una referencia al hipervisor y a su VM de referencia. </text:p>
            </text:list-item>
            <text:list-item>
              <text:p text:style-name="P14">El usuario sólo interactúa con el descriptor para realizar TODAS las funciones de administración de la VM correspondiente. La idea es que, desde el punto de vista del usuario, el descriptor representa la VM, de forma que sea “lo mismo”. </text:p>
            </text:list-item>
            <text:list-item>
              <text:p text:style-name="P14">Podemos establecer una analogía entre estos descriptores y los ficheros de disco en un sistema operativo, en el sentido de que, un usuario ve un fichero de disco como un objeto con ciertos métodos. Pero no interactúa con su representación de bloques a nivel de partición de disco, ni se preocupa que cada fichero esté en una partición con un formato diferente. La idea es parecida, que el usuario vea todas las VM de forma similar. Pero el orquestador se preocupa de detalles de bajo nivel, como saber qué hipervisor se ejecuta, qué tipo de hipervisor es, y otros detalles.</text:p>
            </text:list-item>
          </text:list>
        </text:list-item>
      </text:list>
      <text:p text:style-name="P20"/>
      <text:p text:style-name="P26"><text:bookmark text:name="_7z0ga888esel"/>Reflexiones acerca de la coherencia de datos.</text:p>
      <text:p text:style-name="P21"><text:tab/>Tenemos pues 3 entidades con información relacionada: </text:p>
      <text:list xml:id="list351653373" text:style-name="WWNum5">
        <text:list-item>
          <text:p text:style-name="P15">La definición de una <office:annotation office:name="__Annotation__73_2264489086"><dc:creator>Guillermo Pérez Trabado</dc:creator><dc:date>2025-10-16T19:32:33</dc:date><text:p><text:span text:style-name="T7">Me parece acertado:</text:span></text:p><text:p><text:span text:style-name="T7">-Creo que el primero se correspondería con el fichero en YML que describe la orquestación de forma esquemática.</text:span></text:p><text:p><text:span text:style-name="T7">-El segundo se corresponde con una entrada en la DB del orquestador (módulo orchtools).</text:span></text:p><text:p><text:span text:style-name="T7">-El tercero es la VM creada en uno de los hipervisores del cluster ESX y que puede ser maipulada mediante la librería esxobjects.</text:span></text:p></office:annotation>VM<office:annotation-end office:name="__Annotation__73_2264489086"/></text:p>
        </text:list-item>
        <text:list-item>
          <text:p text:style-name="P15">El descriptor de una VM</text:p>
        </text:list-item>
        <text:list-item>
          <text:p text:style-name="P15">La MV</text:p>
        </text:list-item>
      </text:list>
      <text:p text:style-name="P21"><text:tab/>Es deseable mantener una coherencia entre estos datos. Además, para el usuario del sistema, tiene que ser lo más sencillo posible. La solución propuesta pasa por que el usuario sólo vea un objeto. En este caso el descriptor. Así que, para simplificarlo, unificamos la definición con el descriptor. Lo que hacemos es que el descriptor, también guarde la <office:annotation office:name="__Annotation__81_2264489086"><dc:creator>Guillermo Pérez Trabado</dc:creator><dc:date>2025-10-16T19:35:40</dc:date><text:p><text:span text:style-name="T7">Aquí hay un pequeño problema. La definición puede afectar a cientos de descriptores que han sido creados por la definición. Podrían estar linkados como que "dependen" de una definición concreta.</text:span></text:p><text:p><text:span text:style-name="T7">Sería algo parecido al lenguaje docker compose. Si se altera el texto de la definición, se modifican los container a arrancar. Otra cosa es que luego se pongan en marcha porque pueda no haber recursos de forma temporal. El modelo es muy similar a un como funciona un stack en docker.</text:span></text:p></office:annotation>definición<office:annotation-end office:name="__Annotation__81_2264489086"/> de la VM. Así , un descriptor es un objeto que hace varias cosas:</text:p>
      <text:list xml:id="list181135829" text:style-name="WWNum6">
        <text:list-item>
          <text:p text:style-name="P4">guarda la definición de la VM</text:p>
        </text:list-item>
        <text:list-item>
          <text:p text:style-name="P4">tiene una referencia a la VM</text:p>
        </text:list-item>
        <text:list-item>
          <text:p text:style-name="P4">tiene los métodos necesarios para todo el ciclo de vida de la VM</text:p>
        </text:list-item>
        <text:list-item>
          <text:p text:style-name="P4">Un concepto importante es ver qué un descriptor estará en alguno de estos estados: (se podrá modelar como una máquina de estados):</text:p>
          <text:list>
            <text:list-item>
              <text:p text:style-name="P16"><text:span text:style-name="T2">Provisioned</text:span>: El descriptor existe, pero la VM no ha sido instalada en el hipervisor. Es solo una definición o plantilla. </text:p>
            </text:list-item>
            <text:list-item>
              <text:p text:style-name="P16"><text:span text:style-name="T2">Created</text:span>: La VM ha sido instanciada en el hipervisor con sus recursos, pero está apagada. Es su estado "frío".</text:p>
            </text:list-item>
            <text:list-item>
              <text:p text:style-name="P16"><text:span text:style-name="T2">Starting</text:span>: La VM está en el proceso de encendido. Es un estado de <office:annotation office:name="__Annotation__96_2264489086"><dc:creator>Guillermo Pérez Trabado</dc:creator><dc:date>2025-10-16T18:02:35</dc:date><text:p><text:span text:style-name="T7">Aquí ya me parece hila muy fino, ya que la diferencia entre starting y running es difusa. La única forma de saber que ha terminado de arrancar es que tenga VMWare Tools u otro agente (como QEMU agent) dentro. Pero hay instalaciones de VMs que no tienen agente y no se puede distinguir.</text:span></text:p><text:p><text:span text:style-name="T7">Yo en general considero ambos estados como poweredOn. La única diferencia es si ofrece información de agente interno o no.</text:span></text:p><text:p><text:span text:style-name="T7">Sin embargo, el estado "provisioning" sí que tiene sentido. Cuando defino cientos de VMs, ESX puede tardar bastante en instanciar una VM tras pedirlo por ejemplo porque se están haciendon varios full clone de un disco de varios GB. Precisamente VMWare crea un "TASK" cuando crea una VM o cuando la enciende, y se puede preguntar por el estado de un TASK concreto más tarde.</text:span></text:p></office:annotation>transición<office:annotation-end office:name="__Annotation__96_2264489086"/>.</text:p>
            </text:list-item>
            <text:list-item>
              <text:p text:style-name="P16"><text:span text:style-name="T2">Running</text:span>: La VM está activa y en funcionamiento.</text:p>
            </text:list-item>
            <text:list-item>
              <text:p text:style-name="P16"><text:soft-page-break/><text:span text:style-name="T2">Paused</text:span>: La VM está suspendida, pero su estado está guardado en memoria.</text:p>
            </text:list-item>
            <text:list-item>
              <text:p text:style-name="P16"><text:span text:style-name="T2">Stopping</text:span>: La VM está en proceso de apagado. Es otro estado de transición.</text:p>
            </text:list-item>
            <text:list-item>
              <text:p text:style-name="P16"><text:span text:style-name="T2">Stopped</text:span>: La VM ha sido apagada. Es idéntico al estado <text:span text:style-name="T3">Created</text:span> en la práctica, pero se llega a él después de haber estado en <text:span text:style-name="T4">Running</text:span>. A menudo, en la implementación, <text:span text:style-name="T4">Created</text:span> y <text:span text:style-name="T4">Stopped</text:span> pueden ser el mismo estado con nombres diferentes en el código.</text:p>
            </text:list-item>
            <text:list-item>
              <text:p text:style-name="P16"><text:span text:style-name="T2">Failed</text:span>: Se puede pasar a este estado desde cualquier otro si ocurre un <office:annotation office:name="__Annotation__119_2264489086"><dc:creator>Guillermo Pérez Trabado</dc:creator><dc:date>2025-10-16T18:05:21</dc:date><text:p><text:span text:style-name="T7">Mejor "Provisioning failed" o "provisioning not available".</text:span></text:p><text:p><text:span text:style-name="T7">Falta también "rebooting" que es un estado concreto muy usado, pero tiene el mismo problema de no poder diferenciar cuando termina el reboot si no hay agente.</text:span></text:p><text:p><text:span text:style-name="T7">Habría que añadir a la definición de la VM que el software no tiene agente para saber cuando ha terminado de iniciar!!!!</text:span></text:p></office:annotation>error<office:annotation-end office:name="__Annotation__119_2264489086"/>.</text:p>
            </text:list-item>
          </text:list>
        </text:list-item>
      </text:list>
      <text:p text:style-name="P21"/>
      <text:p text:style-name="P21">De esta forma la definición se utiliza para la creación de la VM. ¿Cómo aseguramos la coherencia de los datos? Pues no dejando modificaciones en la definición de una VM que ya está creada. Para ser más precisos, habrá parámetros que se puedan modificar y otros no. Esto se analiza más adelante.</text:p>
      <text:p text:style-name="P21">De esta forma, siempre habrá una correspondencia entre la definición, que está guardada en el descriptor, y la VM. Pero ¿qué pasa si alguien bypasea el orquestador y modifica directamente una VM en el hypervisor? La respuesta está en esta pregunta: ¿que pasa con un fichero si alguien accede a los bloques de disco directamente? Pues puede crear incoherencia de datos, por eso, no se debe hacer. Aún así, en nuestros sistema, esta incoherencia es temporal, ya que, si <text:s/>descriptor pasa a modo Provisioned, es decir, destruye la VM, la volverá a crear con la definición. Lo mismo ocurre al pasar de Stopped a Running, se podría habilitar la opción de que reescriba en el hypervisor, la configuración de los parámetros de la definición; así vuelve a haber coherencia. Esto son opciones a estudiar.</text:p>
      <text:p text:style-name="P21"/>
      <text:p text:style-name="P21"/>
      <text:p text:style-name="P26"><text:bookmark text:name="_bjbv9oaj0bif"/>Características del orquestador</text:p>
      <text:list xml:id="list4081232038" text:style-name="WWNum11">
        <text:list-item>
          <text:p text:style-name="P5">Mantendrá una lista de todas las VM ,así como de sus definiciones. Todo unificado en el objeto “descriptor”, aunque conceptualmente, para un usuario es una VM “<office:annotation office:name="__Annotation__131_2264489086"><dc:creator>Guillermo Pérez Trabado</dc:creator><dc:date>2025-10-16T17:42:53</dc:date><text:p><text:span text:style-name="T7">Para el usuario es el "request" para que el "orquestador" genere una instancia implementando la VM en el cluster de hipervisores que controla, que puede ser de cualquier tipo (ESXi, ProxMox, QEMU, etc.).</text:span></text:p><text:p><text:span text:style-name="T7">El objetivo es que se genere una VM con los recursos (CPU,MEM) indicados, los interfaces conectados a las VLANs indicadas con las MACs indicadas, y usando clones de las imágenes de disco indicadas.</text:span></text:p></office:annotation>mejorada<office:annotation-end office:name="__Annotation__131_2264489086"/>”</text:p>
        </text:list-item>
        <text:list-item>
          <text:p text:style-name="P5">Para poder manejar cientos de VM, se organizarán en forma de árbol. Esto permitirá realizar cualquier tipo de organización. No sólo la de asignaturas/alumos/máquina, sino también cualquier otra necesidad: empresa/departamento/experimento/maquina, o lo que la se necesite. Esto da más universalidad. Los descriptores tendrán un nombre largo de la forma “/folder/subfolder/…/VMname”. Esta organización permitirá filtrar, mover copiar, etc.y más ventajas que veremos.</text:p>
        </text:list-item>
        <text:list-item>
          <text:p text:style-name="P5">Permitirá tener VM en diferentes hipervisores. Cada descriptor sabe dónde está la VM, en qué hipervisor. Es más, sabe el tipo de hipervisor, lo que permite tener diferentes hipervisores de diferentes tecnologías, unos pueden ser VMware, otros Proxmox, otros Oracle… El orquestador traducirá los métodos a llamadas a cada hypervisor usando un driver determinado para cada <office:annotation office:name="__Annotation__138_2264489086"><dc:creator>Guillermo Pérez Trabado</dc:creator><dc:date>2025-10-16T17:45:33</dc:date><text:p><text:span text:style-name="T7">De momento no había pensado mucho en dar instrucciones concretas sobre el hypervisor la definición de la VM. Actualmente solo doy directivas genéricas como el cluster en el que se creará (en realidad como hasta ahora solo hay soporte de ESX, lo único que hago es dar la lista de hipervisores sobre los que se puede dar de alta la la VM.</text:span></text:p></office:annotation>tipo<office:annotation-end office:name="__Annotation__138_2264489086"/>.</text:p>
        </text:list-item>
        <text:list-item>
          <text:p text:style-name="P5">Como el descriptor puede estar en modo Provisioned, se puede hacer un despliegue “preliminar” de una infraestructura sin necesidad de usar los hipervisores reales. Esto también permitirá copiar y pegar, duplicar, etc. las máquinas Provisioned. Esto permite tener “carpetas” con copias de definiciones. También, tener máquinas “dummy” o “placeholders” por si en algún caso es útil.</text:p>
        </text:list-item>
        <text:list-item>
          <text:p text:style-name="P5">Al estar organziadas en árbol, se podrán tener definiciones comunes: ver más adelante: “definiciones heradadas en cascada”</text:p>
        </text:list-item>
        <text:list-item>
          <text:p text:style-name="P5">Tendrá control de usuarios. Existirán 3 roles:</text:p>
          <text:list>
            <text:list-item>
              <text:p text:style-name="P17">Superusuario</text:p>
            </text:list-item>
            <text:list-item>
              <text:p text:style-name="P17">Manager. Podrá crear carpetas, y descriptores</text:p>
            </text:list-item>
            <text:list-item>
              <text:p text:style-name="P17">Usuario simple: Podrá arrancar, parar, crear y destruir VMs. </text:p>
            </text:list-item>
          </text:list>
        </text:list-item>
        <text:list-item>
          <text:p text:style-name="P5">Se podrán incluir parámetros personalizados, para ampliar la funcionalidad futura, o uso por parte de aplicaciones.</text:p>
        </text:list-item>
        <text:list-item>
          <text:p text:style-name="P5">Se podrá guardar las direcciones IP de las NIC de las MV</text:p>
        </text:list-item>
      </text:list>
      <text:p text:style-name="P1"><text:soft-page-break/></text:p>
      <text:p text:style-name="P21"/>
      <text:p text:style-name="P26"><text:bookmark text:name="_itymibf75ute"/>Parámetros de una VM.</text:p>
      <text:p text:style-name="P21">Como hemos dicho, la definición de una VM es una lista de parámetros. Seguramente más <office:annotation office:name="__Annotation__156_2264489086"><dc:creator>Guillermo Pérez Trabado</dc:creator><dc:date>2025-10-16T19:38:54</dc:date><text:p><text:span text:style-name="T7">Para esta sección te recomiendo que mires cómo ha quedado la definición de la asignatura expresada en YML gracias a las varias capas de herencia de definiciones de hardware y NICs. El ejemplo que te adjunto en el email es real y ha quedado muy bien porque he podido definir una conectividad de red realmente complicada (segmentación de redes).</text:span></text:p></office:annotation>que<office:annotation-end office:name="__Annotation__156_2264489086"/> una simple lista, se organicen en grupos. Un diccionario de varios niveles, que se puede representar en json o en yaml fácilmente.</text:p>
      <text:p text:style-name="P21">Hay que distinguir entre 2 tipos de parámetros, de creación y de ejecución</text:p>
      <text:list xml:id="list2843826029" text:style-name="WWNum8">
        <text:list-item>
          <text:p text:style-name="P6">Parámetros de creación.</text:p>
          <text:list>
            <text:list-item>
              <text:p text:style-name="P18">Son los que se usan en la creación de una VM, como por ejemplo:</text:p>
              <text:list>
                <text:list-item>
                  <text:p text:style-name="P22">En qué hipervisor de crea</text:p>
                </text:list-item>
                <text:list-item>
                  <text:p text:style-name="P22">Nombre de VM</text:p>
                </text:list-item>
                <text:list-item>
                  <text:p text:style-name="P22">Imagen origen del disco</text:p>
                </text:list-item>
                <text:list-item>
                  <text:p text:style-name="P22">Ubicació de disco duro virtual</text:p>
                </text:list-item>
                <text:list-item>
                  <text:p text:style-name="P22">etc.</text:p>
                </text:list-item>
              </text:list>
            </text:list-item>
          </text:list>
        </text:list-item>
        <text:list-item>
          <text:p text:style-name="P6">Parámteros de ejecución</text:p>
          <text:list>
            <text:list-item>
              <text:p text:style-name="P18">Estos parámetros también se usan en la creación de la VM, pero pueden ser modificados con la VM parada, como por ejemplo:</text:p>
              <text:list>
                <text:list-item>
                  <text:p text:style-name="P22">Cantidad de memoria</text:p>
                </text:list-item>
                <text:list-item>
                  <text:p text:style-name="P22">NICs y sus direcciones MAC</text:p>
                </text:list-item>
                <text:list-item>
                  <text:p text:style-name="P22">CDs virtuales conectados</text:p>
                </text:list-item>
                <text:list-item>
                  <text:p text:style-name="P22">En general, lo que los hypervisores dejan modificar con la máquina parada.</text:p>
                </text:list-item>
              </text:list>
            </text:list-item>
          </text:list>
        </text:list-item>
      </text:list>
      <text:p text:style-name="P21">De esta forma tenemos claro que el descriptor, dejará modificar ciertos parámetros en función de su estado. Los de creación sólo se podrán modificar en estado Provisioned, y los de ejecución en estado Provisioned y Stopped.</text:p>
      <text:p text:style-name="P21"/>
      <text:p text:style-name="P26"><text:bookmark text:name="_dbx9opseb3by"/>Definiciones heredadas en cascada</text:p>
      <text:p text:style-name="P21"><text:soft-page-break/>Al haber permitido guardar los descriptores con una jerarquía de arbol, podemos aprovechas esto para crear un sistema de definiciones comunes. </text:p>
      <text:p text:style-name="P21">Supongamos que tenemos una serie de VM que comparten características. Esto es muy común. Por ejemplo: compartirán hipervisor, compartirán datos de red, compartirán prototipos de máquina, etc. PAra no tener que repetir todo eso en los parámetros de definición de cada descriptor, sería idela tener una definición común. Pues esto es fácil de hacer con el arbol de descriptores. ¿Cómo? </text:p>
      <text:list xml:id="list1324787329" text:style-name="WWNum2">
        <text:list-item>
          <text:p text:style-name="P7">Cada carpeta tiene una “definición común”, una lista de parámetros comunes a esa carpeta. </text:p>
        </text:list-item>
        <text:list-item>
          <text:p text:style-name="P7">Cada descriptor tiene sus parámetros “locales”. Peus bien,</text:p>
        </text:list-item>
        <text:list-item>
          <text:p text:style-name="P7">La configuración computada, la que se usa para configurar la VM, es una fusión de los parámetros heredados de la carpeta, más los parametros locales. Los locales sobreescriben los posibles comunes que hayan definidos.</text:p>
        </text:list-item>
        <text:list-item>
          <text:p text:style-name="P7">Los parámetros de la definición de la carpeta, también heredan previamente los de la carpeta padre.</text:p>
        </text:list-item>
        <text:list-item>
          <text:p text:style-name="P7">Así, la definición computada de una VM es una definición heredada en cascada desde la carpeta raiz. Cada carpeta va sobreescribiendo parámetros. Al final queda una definición computada completa.</text:p>
        </text:list-item>
        <text:list-item>
          <text:p text:style-name="P7">Esta definición computada se evalúa a demanda, cuando es necesaria usarla. Así, al modificar algún parámetro en un nivel anterior, se propaga su definición, hasta los descriptores.</text:p>
        </text:list-item>
      </text:list>
      <text:p text:style-name="P21">Este sistema permite tener parámetros comunes por niveles. Por ejemplo, en el nivel raiz, de pueden definir hipervisores, cosas de res, prototipos, etc. Esto permite no tener que definirlos más, ya que se heredan. A cierto nivel se pueden definir otros prototipos, y solo se heredan en esa rama.</text:p>
      <text:p text:style-name="P21">Al haber creado el sistema en árbol, si las propiedades de control de acceso se integran como otros parámetros, también se aprovechan da herencia en cascada. Así, se pueden definir políticas de acceso por carpetas, y niveles.</text:p>
      <text:p text:style-name="P21"/>
      <text:p text:style-name="P21"/>
      <text:p text:style-name="P26"><text:bookmark text:name="_mx5deds7nxxe"/>Creación de desctiptores</text:p>
      <text:list xml:id="list4242537722" text:style-name="WWNum7">
        <text:list-item>
          <text:p text:style-name="P8">Creación directa. json o yaml. Para crear un descriptor, se le pasa una lista de parámetros. Como texto o fichero con formato json o yaml.</text:p>
        </text:list-item>
      </text:list>
      <text:p text:style-name="P12"/>
      <text:list xml:id="list44530496793645" text:continue-numbering="true" text:style-name="WWNum7">
        <text:list-item>
          <text:p text:style-name="P8">Programas más sofosticados, como el que crea una infrasturcura a partir de otro yml más complejo. Estos programas, usando ficheros fuente, irán creando descriptores,carpetas, definiciones comunes.</text:p>
        </text:list-item>
      </text:list>
      <text:p text:style-name="P1">¿qué ocurre con la coherencia aquí?</text:p>
      <text:p text:style-name="P1">Han aparecido más fuentes de datos: los ficheros fuente que se usan para crear los descriptores. La idea es que estos ficheros se leen una vez y no tiene por qué estar sincronizados. Una vez creada una infraestructura, se podrá modificar. Otra cosa es que una aplicación quiera mantener esta coherencia. Le corresponde a esa aplicación, encargarse de ello. La idea es la misma, si algo se hace a más alto nivel, usar esa aplicación para todo, y no tocar a más bajo nivel.</text:p>
      <text:p text:style-name="P1"/>
      <text:p text:style-name="P26"><text:bookmark text:name="_796b3pbd3eg5"/>Permisos</text:p>
      <text:p text:style-name="Standard">Habrá unas propiedades para definir permisos por cada recurso, o conjunto de recursos, aprovechando la estructura de árbol.</text:p>
      <text:p text:style-name="Standard"><text:soft-page-break/>Ver “detalles de implementación”</text:p>
      <text:p text:style-name="P1"/>
      <text:p text:style-name="P26"><text:bookmark text:name="_cr54so6990yz"/>Direcciónes IP</text:p>
      <text:p text:style-name="P1">Diferentes modos, en principio, en la configuración de una VM no está la IP. Es en la creación del descriptor donde se define la IP y el modo en que se usara. Habrá varios modos:</text:p>
      <text:list xml:id="list445842389" text:style-name="WWNum9">
        <text:list-item>
          <text:p text:style-name="P9">DHCP normal</text:p>
        </text:list-item>
        <text:list-item>
          <text:p text:style-name="P9">DHCP, con IP codificada en la MAC. Requiere que el servidor DHCP tenga asignaciones estáticas definidas.</text:p>
        </text:list-item>
        <text:list-item>
          <text:p text:style-name="P9">IP fijada con Otros sistemas, como Cloud-init, o escritura directa de configuración en disco virtual.</text:p>
        </text:list-item>
        <text:list-item>
          <text:p text:style-name="P9">etc</text:p>
        </text:list-item>
      </text:list>
      <text:p text:style-name="P1">Por tanto, la comunicación con el IPAM, recae principalmente en las aplicaciones que usan el módulo <office:annotation office:name="__Annotation__214_2264489086"><dc:creator>Guillermo Pérez Trabado</dc:creator><dc:date>2025-10-16T18:11:55</dc:date><text:p><text:span text:style-name="T7">Efectivamente esto no es trabajo del orquestador sino de las aplicaciones que generan las definiciones. El orquestador solo debería ofrecer herramientas sencillas como MAC estática o MAC generada aleatoriamente pero única en todo el sistema de orquestación.</text:span></text:p></office:annotation>orquestador<office:annotation-end office:name="__Annotation__214_2264489086"/>.</text:p>
      <text:p text:style-name="P26"><text:bookmark text:name="_pid4w21h86v0"/>Resumen</text:p>
      <text:p text:style-name="P1"><text:tab/>El orquestador mantiene descriptores que VM. Este interface de más alto nivel, añade al interface del hipervisor, más información; como estado Provisioned, información de permisos, independencia del tipo de hipervisor. Y permite estructuras a medida, al ser un árbol. Esto también permite compartir y heredar propiedades.</text:p>
      <text:p text:style-name="P1"/>
      <text:p text:style-name="P1"/>
      <text:p text:style-name="P25"><text:bookmark text:name="_v3zcqgvau6z9"/>Módulo de despliegue de asignaturas.</text:p>
      <text:p text:style-name="P1"><text:s/>Es una aplicación concreta que, basándose en una definición de infraestructura y <office:annotation office:name="__Annotation__230_2264489086"><dc:creator>Guillermo Pérez Trabado</dc:creator><dc:date>2025-10-16T18:14:26</dc:date><text:p><text:span text:style-name="T7">Justo escribiendo este comentario me he aclarado más con la estructura. El despliegue de asignaturas es una aplicación escrita con la API (servicios y políticas ofrecidas) del orquestador. Este módulo , por ejemplo, implementa mecanismos como la política de asignación de direcciones IP para conjuntos de VMs de las asignaturas.</text:span></text:p></office:annotation>listados<office:annotation-end office:name="__Annotation__230_2264489086"/> de alumnos, despliega todas las VM sobre el orquestador. Este lee los ficheros de origen, crea una carpeta por la asignatura. Dentro, una carpeta por cada alumno. En cada carpeta de alumno, sus VMs. </text:p>
      <text:p text:style-name="P1">Crea las definiciones comunes. </text:p>
      <text:p text:style-name="P1">Asigna IPs con ayuda del IPAM.</text:p>
      <text:p text:style-name="P26"><text:bookmark text:name="_ceaxch9w2zya"/>Detalles de implementación</text:p>
      <text:p text:style-name="P1"><text:tab/>Posibles soluciones de implementación.</text:p>
      <text:list xml:id="list3956335293" text:style-name="WWNum1">
        <text:list-item>
          <text:p text:style-name="P10">Descriptores: queremos una estructura de datos permanente, en disco. Una base de datos o algo similar. Dado que queremos un arbol, una primera solución es utilizar directamente un directorio local y guardar los descriptores como ficheros, y las carpetas como carpetas. Es fácil y práctico. Es una solución de diseño interno, podría cambiar.</text:p>
        </text:list-item>
      </text:list>
      <text:p text:style-name="P1"/>
      <text:list xml:id="list3710214014" text:style-name="WWNum3">
        <text:list-item>
          <text:p text:style-name="P11"><text:soft-page-break/>Definiciones comunes. Ya que tenemos un sistema que guarda descriptores, la definición común de una carpeta se puede guardar como un descriptor especial en cada carpeta: …/common. Lógicamente este nombre queda reservado.</text:p>
          <text:list>
            <text:list-item>
              <text:p text:style-name="P19">/common</text:p>
            </text:list-item>
            <text:list-item>
              <text:p text:style-name="P19">/folder1/common</text:p>
            </text:list-item>
          </text:list>
        </text:list-item>
      </text:list>
      <text:p text:style-name="P21"/>
      <text:list xml:id="list44530826756318" text:continue-numbering="true" text:style-name="WWNum3">
        <text:list-item>
          <text:p text:style-name="P11">Control de usuarios</text:p>
          <text:list>
            <text:list-item>
              <text:p text:style-name="P19">Como primera solución, mantener un fichero con las listas de usuarios y <office:annotation office:name="__Annotation__249_2264489086"><dc:creator>Guillermo Pérez Trabado</dc:creator><dc:date>2025-10-16T19:40:34</dc:date><text:p><text:span text:style-name="T7">Hasta ahora no había tenido tiempo de pensar sobre esto, pero sería itneresante introducir reglas de acceso en la definición en YML para varios usuarios sobre la misma VM, con grupos, etc.</text:span></text:p></office:annotation>grupos<office:annotation-end office:name="__Annotation__249_2264489086"/>.</text:p>
            </text:list-item>
            <text:list-item>
              <text:p text:style-name="P19">En cada descriptor (o definición común, que permite heredar), parámetros de permisos:</text:p>
              <text:list>
                <text:list-item>
                  <text:p text:style-name="P23">Lista de usuarios y grupos con rol de manager para ese recurso, y sus hijos que lo hereden.</text:p>
                </text:list-item>
                <text:list-item>
                  <text:p text:style-name="P23">Lista de usuarios con rol de usuario_simple</text:p>
                </text:list-item>
                <text:list-item>
                  <text:p text:style-name="P23">Permisos : </text:p>
                  <text:list>
                    <text:list-item>
                      <text:p text:style-name="P24">flags que indican qué operaciones están permitidas hacer a un manager, en ese recurso e hijos. Por ejemplo: puede ver, puede crear subcarpetas, puede definir nuevos prototipos, etc.</text:p>
                    </text:list-item>
                    <text:list-item>
                      <text:p text:style-name="P24">idem para usuarios_simples.</text:p>
                    </text:list-item>
                  </text:list>
                </text:list-item>
              </text:list>
            </text:list-item>
            <text:list-item>
              <text:p text:style-name="P19">El acceso web / REST, aprovechará las tecnologías de autenticación existentes en http, para la identificación de usuarios: uso de tokens. Inicialmente BasicAuth. Futuro: <text:s/>OAuth2 Password Flow with JWTs</text:p>
            </text:list-item>
          </text:list>
        </text:list-item>
        <text:list-item>
          <text:p text:style-name="P11">Tecnologías:</text:p>
          <text:list>
            <text:list-item>
              <text:p text:style-name="P19"><text:s/>REST API: FastAPI. httpx</text:p>
            </text:list-item>
            <text:list-item>
              <text:p text:style-name="P19">Web UI: NiceGUI</text:p>
            </text:list-item>
            <text:list-item>
              <text:p text:style-name="P19">Pydantic y box para datos.. json, yaml…</text:p>
            </text:list-item>
            <text:list-item>
              <text:p text:style-name="P19">Rich para CLI</text:p>
            </text:list-item>
            <text:list-item>
              <text:p text:style-name="P19">Celery o RQ para tareas asíncronas (futuro)</text:p>
            </text:list-item>
            <text:list-item>
              <text:p text:style-name="P19"><text:span text:style-name="T5">ruamel.yaml </text:span></text:p>
            </text:list-item>
            <text:list-item>
              <text:p text:style-name="P19"><text:span text:style-name="T5">Authlib o similares</text:span></text:p>
            </text:list-item>
          </text:list>
        </text:list-item>
      </text:list>
      <text:p text:style-name="P1"><text:soft-page-break/></text:p>
      <text:p text:style-name="P1"/>
      <text:p text:style-name="P26"><text:bookmark text:name="_kt97zprtrhfk"/>Fases de desarrollo </text:p>
      <text:p text:style-name="P1">Desarrollo incremental. Cada etapa TTD.</text:p>
      <text:p text:style-name="P1"/>
      <text:p text:style-name="P1">- Creación de un hipervisor Mock, para poder desarrollar desacoplado de un hipervisor real.</text:p>
      <text:p text:style-name="P1">- Módulo orquestador. Driver para hiper hipervisor mock. Inicialmente como librería. Creación de clase Descriptor. Funciones básicas. Creación desde json. Consultas básicas</text:p>
      <text:p text:style-name="P1">- Ampliar funciones de orquestador. Guardado en árbol. Sin herencia. Aumentar métodos.</text:p>
      <text:p text:style-name="P1">- Implementar herencia de propiedades en cascada</text:p>
      <text:p text:style-name="P1">- como servicio. API REST, acceso remoto. Cliente CLI remoto.</text:p>
      <text:p text:style-name="P1">- Implementar control de usuarios-permisos</text:p>
      <text:p text:style-name="P1">- Adaptación de driver para MVware</text:p>
      <text:p text:style-name="P1">- Módulo de despliegue de asignaturas. Adaptar el existente.</text:p>
      <text:p text:style-name="P1">- Mejora de coordinación con IPAM</text:p>
      <text:p text:style-name="P1">- Web gui.</text:p>
      <text:p text:style-name="P1"/>
      <text:p text:style-name="P1"/>
      <text:p text:style-name="P1"/>
      <text:p text:style-name="P1">______</text:p>
      <text:p text:style-name="P1">PAra anteproyecto:</text:p>
      <text:p text:style-name="P1"><text:s/>focalizar en docenc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font-name="Courier New" fo:font-family="'Courier New'" style:font-family-generic="roman" style:font-pitch="variable"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Standard"/>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139" meta:word-count="2448" meta:character-count="14839" meta:non-whitespace-character-count="12586"/>
    <meta:generator>LibreOfficeDev/6.0.5.2$Linux_X86_64 LibreOffice_project/</meta:generator>
  </office:meta>
</office:document-meta>
</file>